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fo:clip="rect(0in, 0in, 0in, 0in)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fo:clip="rect(0in, 0.10988in, 0in, 0in)" draw:stroke="non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fo:clip="rect(0in, 0in, 0.04081in, 0in)" draw:stroke="non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fo:clip="rect(0in, 0in, 0in, 0in)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fo:clip="rect(0in, 0in, 0.08165in, 0in)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fo:clip="rect(0in, 0in, 0.02029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in, 0.10749in, 0in, 0in)" draw:stroke="none"/>
    </style:style>
  </office:automatic-styles>
  <office:body>
    <office:presentation>
      <draw:page draw:name="Slide3" draw:style-name="a380" draw:master-page-name="Master1-Layout7-blank-Blank" presentation:presentation-page-layout-name="Master1-PPL7" draw:id="Slide-258">
        <draw:custom-shape svg:x="0.00167in" svg:y="0in" svg:width="13.33in" svg:height="7.5in" draw:id="id63" draw:style-name="a383" draw:name="Rectangle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Picture 2" svg:x="0.01002in" svg:y="0.0014in" svg:width="13.33331in" svg:height="7.498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385" draw:master-page-name="Master1-Layout7-blank-Blank" presentation:presentation-page-layout-name="Master1-PPL7" draw:id="Slide-259">
        <draw:frame draw:id="id65" draw:style-name="a386" draw:name="Picture 2" svg:x="0.00002in" svg:y="0in" svg:width="13.33331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387" draw:master-page-name="Master1-Layout7-blank-Blank" presentation:presentation-page-layout-name="Master1-PPL7" draw:id="Slide-260">
        <draw:frame draw:id="id66" draw:style-name="a388" draw:name="Picture 2" svg:x="0.00002in" svg:y="0in" svg:width="13.33331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389" draw:master-page-name="Master1-Layout7-blank-Blank" presentation:presentation-page-layout-name="Master1-PPL7" draw:id="Slide-261">
        <draw:frame draw:id="id67" draw:style-name="a390" draw:name="Picture 2" svg:x="0.00002in" svg:y="0in" svg:width="13.33331in" svg:height="7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391" draw:master-page-name="Master1-Layout7-blank-Blank" presentation:presentation-page-layout-name="Master1-PPL7" draw:id="Slide-262">
        <draw:frame draw:id="id68" draw:style-name="a392" draw:name="Picture 2" svg:x="0.00002in" svg:y="0in" svg:width="13.33331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393" draw:master-page-name="Master1-Layout7-blank-Blank" presentation:presentation-page-layout-name="Master1-PPL7" draw:id="Slide-265">
        <draw:frame draw:id="id69" draw:style-name="a394" draw:name="Picture 2" svg:x="0.00002in" svg:y="0in" svg:width="13.33331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395" draw:master-page-name="Master1-Layout7-blank-Blank" presentation:presentation-page-layout-name="Master1-PPL7" draw:id="Slide-263">
        <draw:frame draw:id="id70" draw:style-name="a396" draw:name="Picture 2" svg:x="0.00002in" svg:y="0in" svg:width="13.33331in" svg:height="7.5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5-06-202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5-06-202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5-06-202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5-06-202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5-06-202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5-06-202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5-06-202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5-06-202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5-06-202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5-06-202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5-06-202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5-06-202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Harish reddy</meta:initial-creator>
    <dc:creator>Harish reddy</dc:creator>
    <meta:creation-date>2026-06-25T05:40:24Z</meta:creation-date>
    <dc:date>2026-06-25T06:40:11Z</dc:date>
    <meta:editing-cycles>3</meta:editing-cycles>
    <meta:editing-duration>PT480S</meta:editing-duration>
    <meta:document-statistic meta:paragraph-count="0" meta:word-count="0"/>
  </office:meta>
</office:document-meta>
</file>